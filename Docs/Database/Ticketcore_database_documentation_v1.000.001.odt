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 style:font-family-generic="roman" style:font-pitch="variable"/>
    <style:font-face style:name="Google Sans Text" svg:font-family="'Google Sans Text', sans-serif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ela1" style:family="table">
      <style:table-properties style:width="18.738cm" fo:margin-left="-0.986cm" fo:margin-top="0cm" fo:margin-bottom="0cm" table:align="left" style:writing-mode="page"/>
    </style:style>
    <style:style style:name="Tabela1.A" style:family="table-column">
      <style:table-column-properties style:column-width="4.186cm"/>
    </style:style>
    <style:style style:name="Tabela1.B" style:family="table-column">
      <style:table-column-properties style:column-width="3.533cm"/>
    </style:style>
    <style:style style:name="Tabela1.C" style:family="table-column">
      <style:table-column-properties style:column-width="1.42cm"/>
    </style:style>
    <style:style style:name="Tabela1.D" style:family="table-column">
      <style:table-column-properties style:column-width="1.757cm"/>
    </style:style>
    <style:style style:name="Tabela1.E" style:family="table-column">
      <style:table-column-properties style:column-width="2.189cm"/>
    </style:style>
    <style:style style:name="Tabela1.F" style:family="table-column">
      <style:table-column-properties style:column-width="5.65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="0.049cm" fo:border="0.25pt solid #000000"/>
    </style:style>
    <style:style style:name="P1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style:writing-mode="lr-tb" loext:word-spacing-minimum="75%" loext:word-spacing-maximum="133%"/>
    </style:style>
    <style:style style:name="P2" style:family="paragraph" style:parent-style-name="Heading_20_4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style:writing-mode="lr-tb" loext:word-spacing-minimum="75%" loext:word-spacing-maximum="133%"/>
    </style:style>
    <style:style style:name="P3" style:family="paragraph" style:parent-style-name="Text_20_body" style:list-style-name="WWNum2">
      <style:paragraph-properties fo:margin-left="1.25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1.251cm"/>
        </style:tab-stops>
      </style:paragraph-properties>
    </style:style>
    <style:style style:name="P4" style:family="paragraph" style:parent-style-name="Text_20_body" style:list-style-name="WWNum2">
      <style:paragraph-properties fo:margin-left="2.50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2.501cm"/>
        </style:tab-stops>
      </style:paragraph-properties>
    </style:style>
    <style:style style:name="P5" style:family="paragraph" style:parent-style-name="Heading_20_4">
      <style:paragraph-properties fo:margin-left="0cm" fo:margin-top="0cm" fo:margin-bottom="0.247cm" style:contextual-spacing="false" fo:line-height="114%" fo:text-align="justify" style:justify-single-word="false" fo:text-indent="0cm" style:auto-text-indent="false" style:writing-mode="lr-tb" loext:word-spacing-minimum="75%" loext:word-spacing-maximum="133%"/>
    </style:style>
    <style:style style:name="P6" style:family="paragraph" style:parent-style-name="Text_20_body" style:list-style-name="WWNum3">
      <style:paragraph-properties fo:margin-left="1.25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1.251cm"/>
        </style:tab-stops>
      </style:paragraph-properties>
    </style:style>
    <style:style style:name="P7" style:family="paragraph" style:parent-style-name="Text_20_body" style:list-style-name="WWNum3">
      <style:paragraph-properties fo:margin-left="2.50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2.501cm"/>
        </style:tab-stops>
      </style:paragraph-properties>
    </style:style>
    <style:style style:name="P8" style:family="paragraph" style:parent-style-name="Text_20_body" style:list-style-name="WWNum4">
      <style:paragraph-properties fo:margin-left="1.25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1.251cm"/>
        </style:tab-stops>
      </style:paragraph-properties>
    </style:style>
    <style:style style:name="P9" style:family="paragraph" style:parent-style-name="Text_20_body" style:list-style-name="WWNum4">
      <style:paragraph-properties fo:margin-left="2.50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2.501cm"/>
        </style:tab-stops>
      </style:paragraph-properties>
    </style:style>
    <style:style style:name="P10" style:family="paragraph" style:parent-style-name="Text_20_body" style:list-style-name="WWNum5">
      <style:paragraph-properties fo:margin-left="1.25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1.251cm"/>
        </style:tab-stops>
      </style:paragraph-properties>
    </style:style>
    <style:style style:name="P11" style:family="paragraph" style:parent-style-name="Text_20_body" style:list-style-name="WWNum5">
      <style:paragraph-properties fo:margin-left="2.50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2.501cm"/>
        </style:tab-stops>
      </style:paragraph-properties>
    </style:style>
    <style:style style:name="P12" style:family="paragraph" style:parent-style-name="Text_20_body" style:list-style-name="WWNum6">
      <style:paragraph-properties fo:margin-left="1.25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1.251cm"/>
        </style:tab-stops>
      </style:paragraph-properties>
    </style:style>
    <style:style style:name="P13" style:family="paragraph" style:parent-style-name="Text_20_body" style:list-style-name="WWNum6">
      <style:paragraph-properties fo:margin-left="2.50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2.501cm"/>
        </style:tab-stops>
      </style:paragraph-properties>
    </style:style>
    <style:style style:name="P14" style:family="paragraph" style:parent-style-name="Text_20_body" style:list-style-name="WWNum7">
      <style:paragraph-properties fo:margin-left="1.25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1.251cm"/>
        </style:tab-stops>
      </style:paragraph-properties>
    </style:style>
    <style:style style:name="P15" style:family="paragraph" style:parent-style-name="Text_20_body" style:list-style-name="WWNum7">
      <style:paragraph-properties fo:margin-left="2.50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2.501cm"/>
        </style:tab-stops>
      </style:paragraph-properties>
    </style:style>
    <style:style style:name="P16" style:family="paragraph" style:parent-style-name="Text_20_body" style:list-style-name="WWNum8">
      <style:paragraph-properties fo:margin-left="1.25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1.251cm"/>
        </style:tab-stops>
      </style:paragraph-properties>
    </style:style>
    <style:style style:name="P17" style:family="paragraph" style:parent-style-name="Text_20_body" style:list-style-name="WWNum8">
      <style:paragraph-properties fo:margin-left="2.50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2.501cm"/>
        </style:tab-stops>
      </style:paragraph-properties>
    </style:style>
    <style:style style:name="P18" style:family="paragraph" style:parent-style-name="Text_20_body" style:list-style-name="WWNum9">
      <style:paragraph-properties fo:margin-left="1.25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1.251cm"/>
        </style:tab-stops>
      </style:paragraph-properties>
    </style:style>
    <style:style style:name="P19" style:family="paragraph" style:parent-style-name="Text_20_body" style:list-style-name="WWNum9">
      <style:paragraph-properties fo:margin-left="2.50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2.501cm"/>
        </style:tab-stops>
      </style:paragraph-properties>
    </style:style>
    <style:style style:name="P20" style:family="paragraph" style:parent-style-name="Text_20_body" style:list-style-name="WWNum10">
      <style:paragraph-properties fo:margin-left="1.25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1.251cm"/>
        </style:tab-stops>
      </style:paragraph-properties>
    </style:style>
    <style:style style:name="P21" style:family="paragraph" style:parent-style-name="Text_20_body" style:list-style-name="WWNum10">
      <style:paragraph-properties fo:margin-left="2.50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2.501cm"/>
        </style:tab-stops>
      </style:paragraph-properties>
    </style:style>
    <style:style style:name="P22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style:writing-mode="lr-tb" loext:word-spacing-minimum="75%" loext:word-spacing-maximum="133%"/>
      <style:text-properties style:font-name="Google Sans" fo:font-weight="bold" style:font-weight-asian="bold" style:font-weight-complex="bold"/>
    </style:style>
    <style:style style:name="P23" style:family="paragraph" style:parent-style-name="Text_20_body" style:list-style-name="WWNum11">
      <style:paragraph-properties fo:margin-top="0cm" fo:margin-bottom="0.247cm" style:contextual-spacing="false" fo:line-height="114%" fo:text-align="justify" style:justify-single-word="false" style:writing-mode="lr-tb" loext:word-spacing-minimum="75%" loext:word-spacing-maximum="133%"/>
    </style:style>
    <style:style style:name="P24" style:family="paragraph" style:parent-style-name="Text_20_body" style:list-style-name="WWNum12">
      <style:paragraph-properties fo:margin-left="1.27cm" fo:margin-right="0cm" fo:margin-top="0cm" fo:margin-bottom="0.247cm" style:contextual-spacing="false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1.27cm"/>
        </style:tab-stops>
      </style:paragraph-properties>
    </style:style>
    <style:style style:name="P25" style:family="paragraph" style:parent-style-name="Text_20_body" style:list-style-name="WWNum13">
      <style:paragraph-properties fo:margin-left="1.27cm" fo:margin-right="0cm" fo:margin-top="0cm" fo:margin-bottom="0.247cm" style:contextual-spacing="false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1.27cm"/>
        </style:tab-stops>
      </style:paragraph-properties>
    </style:style>
    <style:style style:name="P26" style:family="paragraph" style:parent-style-name="Text_20_body" style:list-style-name="WWNum14">
      <style:paragraph-properties fo:margin-left="1.27cm" fo:margin-right="0cm" fo:margin-top="0cm" fo:margin-bottom="0.247cm" style:contextual-spacing="false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1.27cm"/>
        </style:tab-stops>
      </style:paragraph-properties>
    </style:style>
    <style:style style:name="P27" style:family="paragraph" style:parent-style-name="Text_20_body" style:list-style-name="WWNum15">
      <style:paragraph-properties fo:margin-left="1.27cm" fo:margin-right="0cm" fo:margin-top="0cm" fo:margin-bottom="0.247cm" style:contextual-spacing="false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1.27cm"/>
        </style:tab-stops>
      </style:paragraph-properties>
    </style:style>
    <style:style style:name="P28" style:family="paragraph" style:parent-style-name="Text_20_body" style:list-style-name="WWNum16">
      <style:paragraph-properties fo:margin-left="1.27cm" fo:margin-right="0cm" fo:margin-top="0cm" fo:margin-bottom="0.247cm" style:contextual-spacing="false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1.27cm"/>
        </style:tab-stops>
      </style:paragraph-properties>
    </style:style>
    <style:style style:name="P29" style:family="paragraph" style:parent-style-name="Text_20_body" style:list-style-name="WWNum17">
      <style:paragraph-properties fo:margin-left="1.27cm" fo:margin-right="0cm" fo:margin-top="0cm" fo:margin-bottom="0.247cm" style:contextual-spacing="false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1.27cm"/>
        </style:tab-stops>
      </style:paragraph-properties>
    </style:style>
    <style:style style:name="P30" style:family="paragraph" style:parent-style-name="Text_20_body" style:list-style-name="WWNum18">
      <style:paragraph-properties fo:margin-left="1.27cm" fo:margin-right="0cm" fo:margin-top="0cm" fo:margin-bottom="0.247cm" style:contextual-spacing="false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1.27cm"/>
        </style:tab-stops>
      </style:paragraph-properties>
    </style:style>
    <style:style style:name="P31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style:writing-mode="lr-tb" loext:word-spacing-minimum="75%" loext:word-spacing-maximum="133%"/>
      <style:text-properties style:font-name="Google Sans Text" fo:font-weight="normal" style:font-weight-asian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14%" fo:text-align="justify" style:justify-single-word="false" fo:text-indent="0cm" style:auto-text-indent="false" style:writing-mode="lr-tb" loext:word-spacing-minimum="75%" loext:word-spacing-maximum="133%"/>
    </style:style>
    <style:style style:name="P33" style:family="paragraph" style:parent-style-name="Table_20_Contents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style:writing-mode="lr-tb" loext:word-spacing-minimum="75%" loext:word-spacing-maximum="133%"/>
    </style:style>
    <style:style style:name="P34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style:writing-mode="lr-tb" loext:word-spacing-minimum="75%" loext:word-spacing-maximum="133%"/>
      <style:text-properties style:font-name="Google Sans" fo:font-weight="normal" style:font-weight-asian="normal" style:font-weight-complex="normal"/>
    </style:style>
    <style:style style:name="P35" style:family="paragraph" style:parent-style-name="Heading_20_3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style:writing-mode="lr-tb" loext:word-spacing-minimum="75%" loext:word-spacing-maximum="133%"/>
    </style:style>
    <style:style style:name="P36" style:family="paragraph" style:parent-style-name="Text_20_body">
      <style:paragraph-properties fo:line-height="114%" fo:text-align="justify" style:justify-single-word="false" style:writing-mode="lr-tb" loext:word-spacing-minimum="75%" loext:word-spacing-maximum="133%"/>
    </style:style>
    <style:style style:name="P37" style:family="paragraph" style:parent-style-name="Text_20_body" style:list-style-name="WWNum19">
      <style:paragraph-properties fo:margin-left="1.25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1.251cm"/>
        </style:tab-stops>
      </style:paragraph-properties>
    </style:style>
    <style:style style:name="P38" style:family="paragraph" style:parent-style-name="Text_20_body" style:list-style-name="WWNum19">
      <style:paragraph-properties fo:margin-left="2.50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2.501cm"/>
        </style:tab-stops>
      </style:paragraph-properties>
    </style:style>
    <style:style style:name="P39" style:family="paragraph" style:parent-style-name="Text_20_body" style:list-style-name="WWNum19">
      <style:paragraph-properties fo:margin-left="2.501cm" fo:margin-top="0cm" fo:margin-bottom="0.247cm" style:contextual-spacing="false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2.501cm"/>
        </style:tab-stops>
      </style:paragraph-properties>
    </style:style>
    <style:style style:name="P40" style:family="paragraph" style:parent-style-name="Text_20_body" style:list-style-name="WWNum20">
      <style:paragraph-properties fo:margin-left="1.25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1.251cm"/>
        </style:tab-stops>
      </style:paragraph-properties>
    </style:style>
    <style:style style:name="P41" style:family="paragraph" style:parent-style-name="Text_20_body" style:list-style-name="WWNum20">
      <style:paragraph-properties fo:margin-left="2.50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2.501cm"/>
        </style:tab-stops>
      </style:paragraph-properties>
    </style:style>
    <style:style style:name="P42" style:family="paragraph" style:parent-style-name="Heading_20_3">
      <style:paragraph-properties fo:margin-left="0cm" fo:margin-top="0cm" fo:margin-bottom="0.247cm" style:contextual-spacing="false" fo:line-height="114%" fo:text-align="justify" style:justify-single-word="false" fo:text-indent="0cm" style:auto-text-indent="false" style:writing-mode="lr-tb" loext:word-spacing-minimum="75%" loext:word-spacing-maximum="133%"/>
    </style:style>
    <style:style style:name="P43" style:family="paragraph" style:parent-style-name="Text_20_body" style:list-style-name="WWNum21">
      <style:paragraph-properties fo:margin-left="1.25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1.251cm"/>
        </style:tab-stops>
      </style:paragraph-properties>
    </style:style>
    <style:style style:name="P44" style:family="paragraph" style:parent-style-name="Text_20_body" style:list-style-name="WWNum21">
      <style:paragraph-properties fo:margin-left="2.50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2.501cm"/>
        </style:tab-stops>
      </style:paragraph-properties>
    </style:style>
    <style:style style:name="P45" style:family="paragraph" style:parent-style-name="Text_20_body" style:list-style-name="WWNum22">
      <style:paragraph-properties fo:margin-left="1.25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1.251cm"/>
        </style:tab-stops>
      </style:paragraph-properties>
    </style:style>
    <style:style style:name="P46" style:family="paragraph" style:parent-style-name="Text_20_body" style:list-style-name="WWNum22">
      <style:paragraph-properties fo:margin-left="2.501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2.501cm"/>
        </style:tab-stops>
      </style:paragraph-properties>
    </style:style>
    <style:style style:name="P47" style:family="paragraph" style:parent-style-name="Text_20_body" style:list-style-name="WWNum22">
      <style:paragraph-properties fo:margin-left="3.752cm" fo:line-height="114%" fo:text-align="justify" style:justify-single-word="false" fo:text-indent="-0.499cm" style:auto-text-indent="false" style:writing-mode="lr-tb" loext:word-spacing-minimum="75%" loext:word-spacing-maximum="133%">
        <style:tab-stops>
          <style:tab-stop style:position="3.752cm"/>
        </style:tab-stops>
      </style:paragraph-properties>
    </style:style>
    <style:style style:name="T1" style:family="text">
      <style:text-properties style:font-name="Google Sans" fo:font-weight="bold" style:font-weight-asian="bold" style:font-weight-complex="bold"/>
    </style:style>
    <style:style style:name="T2" style:family="text">
      <style:text-properties style:font-name="Google Sans" fo:font-weight="normal" style:font-weight-asian="normal" style:font-weight-complex="normal"/>
    </style:style>
    <style:style style:name="T3" style:family="text">
      <style:text-properties style:font-name="Google Sans"/>
    </style:style>
    <style:style style:name="T4" style:family="text">
      <style:text-properties style:font-name="Google Sans" fo:font-style="italic" fo:font-weight="normal" style:font-style-asian="italic" style:font-weight-asian="normal" style:font-weight-complex="normal"/>
    </style:style>
    <style:style style:name="T5" style:family="text">
      <style:text-properties style:font-name="Google Sans Text" fo:font-weight="bold" style:font-weight-asian="bold" style:font-weight-complex="bold"/>
    </style:style>
    <style:style style:name="T6" style:family="text">
      <style:text-properties style:font-name="Google Sans Text" fo:font-weight="normal" style:font-weight-asian="normal" style:font-weight-complex="normal"/>
    </style:style>
    <style:style style:name="T7" style:family="text">
      <style:text-properties style:font-name="Google Sans Text"/>
    </style:style>
    <style:style style:name="T8" style:family="text">
      <style:text-properties style:font-name="Google Sans Text" fo:font-weight="bold" style:font-weight-asian="bold"/>
    </style:style>
    <style:style style:name="T9" style:family="text">
      <style:text-properties style:font-name="Google Sans" fo:font-style="italic" style:font-style-asian="italic"/>
    </style:style>
    <style:style style:name="T10" style:family="text">
      <style:text-properties style:font-name="Google Sans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icionário de Dados</text:span><text:span text:style-name="T1"/></text:p>
      <text:h text:style-name="P2" text:outline-level="4" loext:marker-style-name="T1"><text:span text:style-name="T2">Entidade: </text:span><text:span text:style-name="Source_20_Text"><text:span text:style-name="T1">USU_usuario</text:span></text:span></text:h>
      <text:list text:style-name="WWNum2">
        <text:list-item>
          <text:p text:style-name="P3" loext:marker-style-name="T2"><text:span text:style-name="T2">Propósito: Centralizar o cadastro de todas as pessoas físicas ou jurídicas registadas na plataforma, independentemente de atuarem como compradoras de bilhetes ou organizadoras de eventos.</text:span><text:span text:style-name="T2"/></text:p>
        </text:list-item>
        <text:list-item>
          <text:p text:style-name="P3" loext:marker-style-name="T2"><text:span text:style-name="T2">Atributos:</text:span><text:span text:style-name="T2"/></text:p>
          <text:list>
            <text:list-item>
              <text:p text:style-name="P4" loext:marker-style-name="T1"><text:span text:style-name="Source_20_Text"><text:span text:style-name="T1">usu_id_usuario</text:span></text:span><text:span text:style-name="T1"> (BIGINT): </text:span><text:span text:style-name="T2">Identificador único e sequencial (Surrogate ID). Chave Primária (PK). Início em 1000000001.</text:span></text:p>
            </text:list-item>
            <text:list-item>
              <text:p text:style-name="P4" loext:marker-style-name="T1"><text:span text:style-name="Source_20_Text"><text:span text:style-name="T2">u</text:span></text:span><text:span text:style-name="Source_20_Text"><text:span text:style-name="T1">su_nm_usuario</text:span></text:span><text:span text:style-name="T1"> (VARCHAR(150)):</text:span><text:span text:style-name="T2"> Nome completo do utilizador ou razão social da empresa. Não nulo.</text:span></text:p>
            </text:list-item>
            <text:list-item>
              <text:p text:style-name="P4" loext:marker-style-name="T1"><text:span text:style-name="Source_20_Text"><text:span text:style-name="T1">usu_ds_email</text:span></text:span><text:span text:style-name="T1"> (VARCHAR(255)):</text:span><text:span text:style-name="T2"> Endereço de correio eletrónico utilizado para credenciais de acesso. Não nulo e Único (UNIQUE).</text:span></text:p>
            </text:list-item>
            <text:list-item>
              <text:p text:style-name="P4" loext:marker-style-name="T1"><text:span text:style-name="Source_20_Text"><text:span text:style-name="T1">usu_ds_senha</text:span></text:span><text:span text:style-name="T1"> (VARCHAR(255)):</text:span><text:span text:style-name="T2"> Hash seguro da palavra-passe para autenticação. Não nulo.</text:span></text:p>
            </text:list-item>
            <text:list-item>
              <text:p text:style-name="P4" loext:marker-style-name="T1"><text:span text:style-name="Source_20_Text"><text:span text:style-name="T2">u</text:span></text:span><text:span text:style-name="Source_20_Text"><text:span text:style-name="T1">su_nu_cpf_cnpj</text:span></text:span><text:span text:style-name="T1"> (VARCHAR(14)):</text:span><text:span text:style-name="T2"> Número de identificação fiscal (CPF ou CNPJ). Não nulo e Único (UNIQUE).</text:span></text:p>
            </text:list-item>
            <text:list-item>
              <text:p text:style-name="P4" loext:marker-style-name="T1"><text:span text:style-name="Source_20_Text"><text:span text:style-name="T1">usu_bi_foto_perfil</text:span></text:span><text:span text:style-name="T1"> (BYTEA):</text:span><text:span text:style-name="T2"> Arquivo binário da imagem de perfil guardado diretamente na base de dados. Opcional.</text:span></text:p>
            </text:list-item>
            <text:list-item>
              <text:p text:style-name="P4" loext:marker-style-name="T1"><text:span text:style-name="Source_20_Text"><text:span text:style-name="T1">usu_dt_cadastro</text:span></text:span><text:span text:style-name="T1"> (TIMESTAMP):</text:span><text:span text:style-name="T2"> Data e hora exata em que o registo foi efetuado. Valor padrão: </text:span><text:span text:style-name="Source_20_Text"><text:span text:style-name="T2">CURRENT_TIMESTAMP</text:span></text:span><text:span text:style-name="T2">.</text:span></text:p>
            </text:list-item>
          </text:list>
        </text:list-item>
      </text:list>
      <text:h text:style-name="P5" text:outline-level="4" loext:marker-style-name="T3"><text:span text:style-name="T2">Entidade: </text:span><text:span text:style-name="Source_20_Text"><text:span text:style-name="T1">PER_perfil</text:span></text:span></text:h>
      <text:list text:style-name="WWNum3">
        <text:list-item>
          <text:p text:style-name="P6" loext:marker-style-name="T2"><text:span text:style-name="T2">Propósito: Armazenar os papéis ou níveis de acesso permitidos no ecossistema da aplicação para controlo de permissões (</text:span><text:span text:style-name="T4">Role-Based Access Control</text:span><text:span text:style-name="T2">).</text:span></text:p>
        </text:list-item>
        <text:list-item>
          <text:p text:style-name="P6" loext:marker-style-name="T2"><text:span text:style-name="T2">Atributos:</text:span><text:span text:style-name="T2"/></text:p>
          <text:list>
            <text:list-item>
              <text:p text:style-name="P7" loext:marker-style-name="T1"><text:span text:style-name="Source_20_Text"><text:span text:style-name="T1">per_id_perfil</text:span></text:span><text:span text:style-name="T1"> (BIGINT):</text:span><text:span text:style-name="T2"> Identificador único do perfil (ID). Chave Primária (PK).</text:span></text:p>
            </text:list-item>
            <text:list-item>
              <text:p text:style-name="P7" loext:marker-style-name="T1"><text:span text:style-name="Source_20_Text"><text:span text:style-name="T1">per_nm_perfil</text:span></text:span><text:span text:style-name="T1"> (VARCHAR(50)):</text:span><text:span text:style-name="T2"> Nome descritivo do papel de acesso (ex: 'ORGANIZADOR', 'COMPRADOR'). Não nulo e Único (UNIQUE).</text:span></text:p>
            </text:list-item>
          </text:list>
        </text:list-item>
      </text:list>
      <text:h text:style-name="P5" text:outline-level="4" loext:marker-style-name="T3"><text:span text:style-name="T2">Entidade: </text:span><text:span text:style-name="Source_20_Text"><text:span text:style-name="T1">USP_usuario_perfil</text:span></text:span></text:h>
      <text:list text:style-name="WWNum4">
        <text:list-item>
          <text:p text:style-name="P8" loext:marker-style-name="T2"><text:span text:style-name="T2">Propósito: Tabela associativa que resolve o relacionamento de muitos-para-muitos (N:M) entre Utilizadores e Perfis, permitindo que uma mesma conta possua múltiplas permissões simultaneamente.</text:span><text:span text:style-name="T2"/></text:p>
        </text:list-item>
        <text:list-item>
          <text:p text:style-name="P8" loext:marker-style-name="T2"><text:soft-page-break/><text:span text:style-name="T2">Atributos:</text:span><text:span text:style-name="T2"/></text:p>
          <text:list>
            <text:list-item>
              <text:p text:style-name="P9" loext:marker-style-name="T1"><text:span text:style-name="Source_20_Text"><text:span text:style-name="T1">usp_id_usuario</text:span></text:span><text:span text:style-name="T1"> (BIGINT):</text:span><text:span text:style-name="T2"> Código de ligação com o utilizador. Chave Primária Composta e Chave Estrangeira (FK) apontando para </text:span><text:span text:style-name="Source_20_Text"><text:span text:style-name="T2">USU_usuario</text:span></text:span><text:span text:style-name="T2">. Remoção em cascata (</text:span><text:span text:style-name="Source_20_Text"><text:span text:style-name="T2">ON DELETE CASCADE</text:span></text:span><text:span text:style-name="T2">).</text:span></text:p>
            </text:list-item>
            <text:list-item>
              <text:p text:style-name="P9" loext:marker-style-name="T1"><text:span text:style-name="Source_20_Text"><text:span text:style-name="T1">usp_id_perfil</text:span></text:span><text:span text:style-name="T1"> (BIGINT):</text:span><text:span text:style-name="T2"> Código de ligação com o perfil. Chave Primária Composta e Chave Estrangeira (FK) apontando para </text:span><text:span text:style-name="Source_20_Text"><text:span text:style-name="T2">PER_perfil</text:span></text:span><text:span text:style-name="T2">. Remoção em cascata (</text:span><text:span text:style-name="Source_20_Text"><text:span text:style-name="T2">ON DELETE CASCADE</text:span></text:span><text:span text:style-name="T2">).</text:span></text:p>
            </text:list-item>
          </text:list>
        </text:list-item>
      </text:list>
      <text:h text:style-name="P5" text:outline-level="4" loext:marker-style-name="T3"><text:span text:style-name="T2">Entidade: </text:span><text:span text:style-name="Source_20_Text"><text:span text:style-name="T1">CAT_categoria</text:span></text:span></text:h>
      <text:list text:style-name="WWNum5">
        <text:list-item>
          <text:p text:style-name="P10" loext:marker-style-name="T2"><text:span text:style-name="T2">Propósito: Classificar semanticamente os eventos disponíveis no catálogo da plataforma para fins de organização, busca e segmentação.</text:span><text:span text:style-name="T2"/></text:p>
        </text:list-item>
        <text:list-item>
          <text:p text:style-name="P10" loext:marker-style-name="T2"><text:span text:style-name="T2">Atributos:</text:span><text:span text:style-name="T2"/></text:p>
          <text:list>
            <text:list-item>
              <text:p text:style-name="P11" loext:marker-style-name="T1"><text:span text:style-name="Source_20_Text"><text:span text:style-name="T1">cat_id_categoria</text:span></text:span><text:span text:style-name="T1"> (BIGINT):</text:span><text:span text:style-name="T2"> Identificador único da categoria (ID). Chave Primária (PK).</text:span></text:p>
            </text:list-item>
            <text:list-item>
              <text:p text:style-name="P11" loext:marker-style-name="T1"><text:span text:style-name="Source_20_Text"><text:span text:style-name="T1">cat_nm_categoria</text:span></text:span><text:span text:style-name="T1"> (VARCHAR(100)):</text:span><text:span text:style-name="T2"> Nome da categoria (ex: 'Workshop', 'Concerto', 'Desporto'). Não nulo.</text:span></text:p>
            </text:list-item>
            <text:list-item>
              <text:p text:style-name="P11" loext:marker-style-name="T1"><text:span text:style-name="Source_20_Text"><text:span text:style-name="T1">cat_ds_categoria</text:span></text:span><text:span text:style-name="T1"> (TEXT):</text:span><text:span text:style-name="T2"> Descrição textual detalhada sobre as características ou limites da categoria. Opcional.</text:span></text:p>
            </text:list-item>
          </text:list>
        </text:list-item>
      </text:list>
      <text:h text:style-name="P5" text:outline-level="4" loext:marker-style-name="T3"><text:span text:style-name="T2">Entidade: </text:span><text:span text:style-name="Source_20_Text"><text:span text:style-name="T1">EVE_evento</text:span></text:span></text:h>
      <text:list text:style-name="WWNum6">
        <text:list-item>
          <text:p text:style-name="P12" loext:marker-style-name="T2"><text:span text:style-name="T2">Propósito: Registar os metadados estruturais de cada atração criada na plataforma por um organizador autorizado.</text:span><text:span text:style-name="T2"/></text:p>
        </text:list-item>
        <text:list-item>
          <text:p text:style-name="P12" loext:marker-style-name="T2"><text:span text:style-name="T2">Atributos:</text:span><text:span text:style-name="T2"/></text:p>
          <text:list>
            <text:list-item>
              <text:p text:style-name="P13" loext:marker-style-name="T1"><text:span text:style-name="Source_20_Text"><text:span text:style-name="T1">eve_id_evento</text:span></text:span><text:span text:style-name="T1"> (BIGINT):</text:span><text:span text:style-name="T2"> Identificador único do evento (ID). Chave Primária (PK).</text:span></text:p>
            </text:list-item>
            <text:list-item>
              <text:p text:style-name="P13" loext:marker-style-name="T1"><text:span text:style-name="Source_20_Text"><text:span text:style-name="T1">eve_id_organizador</text:span></text:span><text:span text:style-name="T1"> (BIGINT): </text:span><text:span text:style-name="T2">Chave Estrangeira (FK) que aponta para o utilizador criador (</text:span><text:span text:style-name="Source_20_Text"><text:span text:style-name="T2">USU_usuario</text:span></text:span><text:span text:style-name="T2">). Não nulo.</text:span></text:p>
            </text:list-item>
            <text:list-item>
              <text:p text:style-name="P13" loext:marker-style-name="T1"><text:span text:style-name="Source_20_Text"><text:span text:style-name="T1">eve_id_categoria</text:span></text:span><text:span text:style-name="T1"> (BIGINT): </text:span><text:span text:style-name="T2">Chave Estrangeira (FK) que categoriza o evento (</text:span><text:span text:style-name="Source_20_Text"><text:span text:style-name="T2">CAT_categoria</text:span></text:span><text:span text:style-name="T2">). Não nulo.</text:span></text:p>
            </text:list-item>
            <text:list-item>
              <text:p text:style-name="P13" loext:marker-style-name="T1"><text:span text:style-name="Source_20_Text"><text:span text:style-name="T1">eve_nm_evento</text:span></text:span><text:span text:style-name="T1"> (VARCHAR(200)): </text:span><text:span text:style-name="T2">Título ou nome público do evento. Não nulo.</text:span></text:p>
            </text:list-item>
            <text:list-item>
              <text:p text:style-name="P13" loext:marker-style-name="T1"><text:span text:style-name="Source_20_Text"><text:span text:style-name="T1">eve_dt_evento</text:span></text:span><text:span text:style-name="T1"> (TIMESTAMP): </text:span><text:span text:style-name="T2">Data e hora agendadas para a realização da atividade. Não nulo.</text:span></text:p>
            </text:list-item>
            <text:list-item>
              <text:p text:style-name="P13" loext:marker-style-name="T1"><text:soft-page-break/><text:span text:style-name="Source_20_Text"><text:span text:style-name="T1">eve_nm_local</text:span></text:span><text:span text:style-name="T1"> (VARCHAR(200)):</text:span><text:span text:style-name="T2"> Nome do estabelecimento, pavilhão ou recinto onde ocorrerá o evento. Não nulo.</text:span></text:p>
            </text:list-item>
            <text:list-item>
              <text:p text:style-name="P13" loext:marker-style-name="T1"><text:span text:style-name="Source_20_Text"><text:span text:style-name="T1">eve_qt_capacidade</text:span></text:span><text:span text:style-name="T1"> (INTEGER): </text:span><text:span text:style-name="T2">Lotação máxima física permitida para o local do evento. Não nulo com restrição </text:span><text:span text:style-name="Source_20_Text"><text:span text:style-name="T2">CHECK</text:span></text:span><text:span text:style-name="T2"> (deve ser maior que zero).</text:span></text:p>
            </text:list-item>
            <text:list-item>
              <text:p text:style-name="P13" loext:marker-style-name="T1"><text:span text:style-name="Source_20_Text"><text:span text:style-name="T1">eve_ds_imagem</text:span></text:span><text:span text:style-name="T1"> (TEXT): </text:span><text:span text:style-name="T2">Link ou caminho de armazenamento para a imagem de divulgação do banner do evento. Opcional.</text:span></text:p>
            </text:list-item>
          </text:list>
        </text:list-item>
      </text:list>
      <text:h text:style-name="P5" text:outline-level="4" loext:marker-style-name="T3"><text:span text:style-name="T2">Entidade: </text:span><text:span text:style-name="Source_20_Text"><text:span text:style-name="T1">TPI_tipo_ingresso</text:span></text:span></text:h>
      <text:list text:style-name="WWNum7">
        <text:list-item>
          <text:p text:style-name="P14" loext:marker-style-name="T2"><text:span text:style-name="T2">Propósito: Definir o fracionamento dos bilhetes do evento em lotes específicos, setores ou modalidades de venda com preços individualizados.</text:span><text:span text:style-name="T2"/></text:p>
        </text:list-item>
        <text:list-item>
          <text:p text:style-name="P14" loext:marker-style-name="T2"><text:span text:style-name="T2">Atributos:</text:span><text:span text:style-name="T2"/></text:p>
          <text:list>
            <text:list-item>
              <text:p text:style-name="P15" loext:marker-style-name="T1"><text:span text:style-name="Source_20_Text"><text:span text:style-name="T1">tpi_id_tipo_ingresso</text:span></text:span><text:span text:style-name="T1"> (BIGINT): </text:span><text:span text:style-name="T2">Identificador único do tipo de bilhete (ID). Chave Primária (PK).</text:span></text:p>
            </text:list-item>
            <text:list-item>
              <text:p text:style-name="P15" loext:marker-style-name="T1"><text:span text:style-name="Source_20_Text"><text:span text:style-name="T1">tpi_id_evento</text:span></text:span><text:span text:style-name="T1"> (BIGINT):</text:span><text:span text:style-name="T2"> Chave Estrangeira (FK) vinculando o lote ao seu respetivo evento (</text:span><text:span text:style-name="Source_20_Text"><text:span text:style-name="T2">EVE_evento</text:span></text:span><text:span text:style-name="T2">). Remoção em cascata (</text:span><text:span text:style-name="Source_20_Text"><text:span text:style-name="T2">ON DELETE CASCADE</text:span></text:span><text:span text:style-name="T2">).</text:span></text:p>
            </text:list-item>
            <text:list-item>
              <text:p text:style-name="P15" loext:marker-style-name="T1"><text:span text:style-name="Source_20_Text"><text:span text:style-name="T1">tpi_nm_tipo</text:span></text:span><text:span text:style-name="T1"> (VARCHAR(100)): </text:span><text:span text:style-name="T2">Nome do lote ou setor (ex: 'VIP - Lote Inicial', 'Pista Meia-Entrada'). Não nulo.</text:span></text:p>
            </text:list-item>
            <text:list-item>
              <text:p text:style-name="P15" loext:marker-style-name="T1"><text:span text:style-name="Source_20_Text"><text:span text:style-name="T1">tpi_vl_preco</text:span></text:span><text:span text:style-name="T1"> (NUMERIC(10,2)):</text:span><text:span text:style-name="T2"> Valor monetário nominal do bilhete. Não nulo com restrição </text:span><text:span text:style-name="Source_20_Text"><text:span text:style-name="T2">CHECK</text:span></text:span><text:span text:style-name="T2"> (não pode ser negativo).</text:span></text:p>
            </text:list-item>
            <text:list-item>
              <text:p text:style-name="P15" loext:marker-style-name="T1"><text:span text:style-name="Source_20_Text"><text:span text:style-name="T1">tpi_qt_lote</text:span></text:span><text:span text:style-name="T1"> (INTEGER): </text:span><text:span text:style-name="T2">Quantidade máxima de bilhetes emitidos especificamente para este lote. Não nulo com restrição </text:span><text:span text:style-name="Source_20_Text"><text:span text:style-name="T2">CHECK</text:span></text:span><text:span text:style-name="T2"> (maior que zero).</text:span></text:p>
            </text:list-item>
          </text:list>
        </text:list-item>
      </text:list>
      <text:h text:style-name="P5" text:outline-level="4" loext:marker-style-name="T3"><text:span text:style-name="T2">Entidade: </text:span><text:span text:style-name="Source_20_Text"><text:span text:style-name="T1">TRA_transacao</text:span></text:span></text:h>
      <text:list text:style-name="WWNum8">
        <text:list-item>
          <text:p text:style-name="P16" loext:marker-style-name="T2"><text:span text:style-name="T2">Propósito: Centralizar o cabeçalho financeiro e histórico de cada ordem de compra gerada por um comprador no sistema.</text:span><text:span text:style-name="T2"/></text:p>
        </text:list-item>
        <text:list-item>
          <text:p text:style-name="P16" loext:marker-style-name="T2"><text:span text:style-name="T2">Atributos:</text:span><text:span text:style-name="T2"/></text:p>
          <text:list>
            <text:list-item>
              <text:p text:style-name="P17" loext:marker-style-name="T1"><text:span text:style-name="Source_20_Text"><text:span text:style-name="T1">tra_id_transacao</text:span></text:span><text:span text:style-name="T1"> (BIGINT): </text:span><text:span text:style-name="T2">Identificador transacional único (ID). Chave Primária (PK).</text:span></text:p>
            </text:list-item>
            <text:list-item>
              <text:p text:style-name="P17" loext:marker-style-name="T1"><text:span text:style-name="Source_20_Text"><text:span text:style-name="T1">tra_id_comprador</text:span></text:span><text:span text:style-name="T1"> (BIGINT): </text:span><text:span text:style-name="T2">Chave Estrangeira (FK) apontando para o utilizador que efetuou o pagamento (</text:span><text:span text:style-name="Source_20_Text"><text:span text:style-name="T2">USU_usuario</text:span></text:span><text:span text:style-name="T2">). Não nulo.</text:span></text:p>
            </text:list-item>
            <text:list-item>
              <text:p text:style-name="P17" loext:marker-style-name="T1"><text:span text:style-name="Source_20_Text"><text:span text:style-name="T1">tra_dt_transacao</text:span></text:span><text:span text:style-name="T1"> (TIMESTAMP):</text:span><text:span text:style-name="T2"> Data e hora em que a operação financeira ocorreu. Valor padrão: </text:span><text:span text:style-name="Source_20_Text"><text:span text:style-name="T2">CURRENT_TIMESTAMP</text:span></text:span><text:span text:style-name="T2">.</text:span></text:p>
            </text:list-item>
            <text:list-item>
              <text:p text:style-name="P17" loext:marker-style-name="T1"><text:soft-page-break/><text:span text:style-name="Source_20_Text"><text:span text:style-name="T1">tra_st_transacao</text:span></text:span><text:span text:style-name="T1"> (CHAR(1)):</text:span><text:span text:style-name="T2"> Estado atual do pagamento. Não nulo com restrição </text:span><text:span text:style-name="Source_20_Text"><text:span text:style-name="T2">CHECK</text:span></text:span><text:span text:style-name="T2"> limitada ao domínio: </text:span><text:span text:style-name="Source_20_Text"><text:span text:style-name="T2">'P'</text:span></text:span><text:span text:style-name="T2"> (Pendente), </text:span><text:span text:style-name="Source_20_Text"><text:span text:style-name="T2">'C'</text:span></text:span><text:span text:style-name="T2"> (Concluída), </text:span><text:span text:style-name="Source_20_Text"><text:span text:style-name="T2">'X'</text:span></text:span><text:span text:style-name="T2"> (Cancelada). Valor padrão: </text:span><text:span text:style-name="Source_20_Text"><text:span text:style-name="T2">'P'</text:span></text:span><text:span text:style-name="T2"> (Pendente). Fluxo: </text:span><text:span text:style-name="Source_20_Text"><text:span text:style-name="T2">'P'</text:span></text:span><text:span text:style-name="T2"> → </text:span><text:span text:style-name="Source_20_Text"><text:span text:style-name="T2">'C'</text:span></text:span><text:span text:style-name="T2"> (aprovado) ou </text:span><text:span text:style-name="Source_20_Text"><text:span text:style-name="T2">'P'</text:span></text:span><text:span text:style-name="T2"> → </text:span><text:span text:style-name="Source_20_Text"><text:span text:style-name="T2">'X'</text:span></text:span><text:span text:style-name="T2"> (cancelado/recusado).</text:span></text:p>
            </text:list-item>
            <text:list-item>
              <text:p text:style-name="P17" loext:marker-style-name="T1"><text:span text:style-name="Source_20_Text"><text:span text:style-name="T1">tra_vl_total</text:span></text:span><text:span text:style-name="T1"> (NUMERIC(10,2)):</text:span><text:span text:style-name="T2"> Valor consolidado da transação. Não nulo com restrição </text:span><text:span text:style-name="Source_20_Text"><text:span text:style-name="T2">CHECK</text:span></text:span><text:span text:style-name="T2"> (não pode ser negativo).</text:span></text:p>
            </text:list-item>
          </text:list>
        </text:list-item>
      </text:list>
      <text:h text:style-name="P5" text:outline-level="4" loext:marker-style-name="T3"><text:span text:style-name="T2">Entidade: </text:span><text:span text:style-name="Source_20_Text"><text:span text:style-name="T1">ING_ingresso</text:span></text:span></text:h>
      <text:list text:style-name="WWNum9">
        <text:list-item>
          <text:p text:style-name="P18" loext:marker-style-name="T2"><text:span text:style-name="T2">Propósito: Representar a materialização individual de cada bilhete emitido. Um registro nesta tabela equivale a uma entrada física/digital única gerada para acesso ao evento.</text:span><text:span text:style-name="T2"/></text:p>
        </text:list-item>
        <text:list-item>
          <text:p text:style-name="P18" loext:marker-style-name="T2"><text:span text:style-name="T2">Atributos:</text:span><text:span text:style-name="T2"/></text:p>
          <text:list>
            <text:list-item>
              <text:p text:style-name="P19" loext:marker-style-name="T1"><text:span text:style-name="Source_20_Text"><text:span text:style-name="T1">ing_id_ingresso</text:span></text:span><text:span text:style-name="T1"> (BIGINT): </text:span><text:span text:style-name="T2">Identificador único do bilhete (ID). Chave Primária (PK).</text:span></text:p>
            </text:list-item>
            <text:list-item>
              <text:p text:style-name="P19" loext:marker-style-name="T1"><text:span text:style-name="Source_20_Text"><text:span text:style-name="T1">ing_id_transacao</text:span></text:span><text:span text:style-name="T1"> (BIGINT):</text:span><text:span text:style-name="T2"> Chave Estrangeira (FK) vinculando o bilhete à transação mãe da compra (</text:span><text:span text:style-name="Source_20_Text"><text:span text:style-name="T2">TRA_transacao</text:span></text:span><text:span text:style-name="T2">). Não nulo.</text:span></text:p>
            </text:list-item>
            <text:list-item>
              <text:p text:style-name="P19" loext:marker-style-name="T1"><text:span text:style-name="Source_20_Text"><text:span text:style-name="T1">ing_id_tipo_ingresso</text:span></text:span><text:span text:style-name="T1"> (BIGINT): </text:span><text:span text:style-name="T2">Chave Estrangeira (FK) determinando o setor e lote do bilhete (</text:span><text:span text:style-name="Source_20_Text"><text:span text:style-name="T2">TPI_tipo_ingresso</text:span></text:span><text:span text:style-name="T2">). Não nulo.</text:span></text:p>
            </text:list-item>
            <text:list-item>
              <text:p text:style-name="P19" loext:marker-style-name="T1"><text:span text:style-name="Source_20_Text"><text:span text:style-name="T1">ing_cd_acesso</text:span></text:span><text:span text:style-name="T1"> (VARCHAR(50)): </text:span><text:span text:style-name="T2">Código alfanumérico único gerado pelo sistema para validação na catraca (Código Token/QR Code). Não nulo e Único (UNIQUE).</text:span></text:p>
            </text:list-item>
            <text:list-item>
              <text:p text:style-name="P19" loext:marker-style-name="T1"><text:span text:style-name="Source_20_Text"><text:span text:style-name="T1">ing_st_ingresso</text:span></text:span><text:span text:style-name="T1"> (CHAR(1)): </text:span><text:span text:style-name="T2">Estado operacional do bilhete. Não nulo com restrição </text:span><text:span text:style-name="Source_20_Text"><text:span text:style-name="T2">CHECK</text:span></text:span><text:span text:style-name="T2"> limitada ao domínio: </text:span><text:span text:style-name="Source_20_Text"><text:span text:style-name="T2">'A'</text:span></text:span><text:span text:style-name="T2"> (Ativo), </text:span><text:span text:style-name="Source_20_Text"><text:span text:style-name="T2">'U'</text:span></text:span><text:span text:style-name="T2"> (Utilizado), </text:span><text:span text:style-name="Source_20_Text"><text:span text:style-name="T2">'C'</text:span></text:span><text:span text:style-name="T2"> (Cancelado). Valor padrão: </text:span><text:span text:style-name="Source_20_Text"><text:span text:style-name="T2">'A'</text:span></text:span><text:span text:style-name="T2">.</text:span></text:p>
            </text:list-item>
          </text:list>
        </text:list-item>
      </text:list>
      <text:h text:style-name="P5" text:outline-level="4" loext:marker-style-name="T3"><text:span text:style-name="T2">Entidade: </text:span><text:span text:style-name="Source_20_Text"><text:span text:style-name="T1">WEB_webhook</text:span></text:span></text:h>
      <text:list text:style-name="WWNum10">
        <text:list-item>
          <text:p text:style-name="P20" loext:marker-style-name="T2"><text:span text:style-name="T2">Propósito: Gerir as URLs configuradas pelos utilizadores da aplicação para receber gatilhos informativos assíncronos baseados em eventos do sistema.</text:span><text:span text:style-name="T2"/></text:p>
        </text:list-item>
        <text:list-item>
          <text:p text:style-name="P20" loext:marker-style-name="T2"><text:span text:style-name="T2">Atributos:</text:span><text:span text:style-name="T2"/></text:p>
          <text:list>
            <text:list-item>
              <text:p text:style-name="P21" loext:marker-style-name="T1"><text:span text:style-name="Source_20_Text"><text:span text:style-name="T1">web_id_webhook</text:span></text:span><text:span text:style-name="T1"> (BIGINT):</text:span><text:span text:style-name="T2"> Identificador único da configuração (ID). Chave Primária (PK).</text:span></text:p>
            </text:list-item>
            <text:list-item>
              <text:p text:style-name="P21" loext:marker-style-name="T1"><text:span text:style-name="Source_20_Text"><text:span text:style-name="T1">web_id_usuario</text:span></text:span><text:span text:style-name="T1"> (BIGINT):</text:span><text:span text:style-name="T2"> Chave Estrangeira (FK) que define o proprietário do webhook (</text:span><text:span text:style-name="Source_20_Text"><text:span text:style-name="T2">USU_usuario</text:span></text:span><text:span text:style-name="T2">). Remoção em cascata (</text:span><text:span text:style-name="Source_20_Text"><text:span text:style-name="T2">ON DELETE CASCADE</text:span></text:span><text:span text:style-name="T2">).</text:span></text:p>
            </text:list-item>
            <text:list-item>
              <text:p text:style-name="P21" loext:marker-style-name="T1"><text:soft-page-break/><text:span text:style-name="Source_20_Text"><text:span text:style-name="T1">web_ds_url</text:span></text:span><text:span text:style-name="T1"> (TEXT): </text:span><text:span text:style-name="T2">Endereço HTTP completo de destino para onde o payload JSON será enviado via POST. Não nulo.</text:span></text:p>
            </text:list-item>
            <text:list-item>
              <text:p text:style-name="P21" loext:marker-style-name="T1"><text:span text:style-name="Source_20_Text"><text:span text:style-name="T1">web_tp_evento</text:span></text:span><text:span text:style-name="T1"> (VARCHAR(50)):</text:span><text:span text:style-name="T2"> O evento de gatilho que dispara a notificação (ex: 'COMPRA_APROVADA', 'INGRESSO_CANCELADO'). Não nulo.</text:span></text:p>
            </text:list-item>
            <text:list-item>
              <text:p text:style-name="P21" loext:marker-style-name="T1"><text:span text:style-name="Source_20_Text"><text:span text:style-name="T1">web_ch_ativo</text:span></text:span><text:span text:style-name="T1"> (CHAR(1)):</text:span><text:span text:style-name="T2"> Flag booleana de ativação. Não nulo com restrição </text:span><text:span text:style-name="Source_20_Text"><text:span text:style-name="T2">CHECK</text:span></text:span><text:span text:style-name="T2"> limitada a: </text:span><text:span text:style-name="Source_20_Text"><text:span text:style-name="T2">'S'</text:span></text:span><text:span text:style-name="T2"> (Sim - Ativo) ou </text:span><text:span text:style-name="Source_20_Text"><text:span text:style-name="T2">'N'</text:span></text:span><text:span text:style-name="T2"> (Não - Inativo). Valor padrão: </text:span><text:span text:style-name="Source_20_Text"><text:span text:style-name="T2">'S'</text:span></text:span><text:span text:style-name="T2">.</text:span></text:p>
            </text:list-item>
          </text:list>
        </text:list-item>
      </text:list>
      <text:p text:style-name="P22" loext:marker-style-name="T1"/>
      <text:p text:style-name="P1" loext:marker-style-name="T1"><text:span text:style-name="T1">Definição das Siglas:</text:span><text:span text:style-name="T1"/></text:p>
      <text:list text:style-name="WWNum11">
        <text:list-item>
          <text:p text:style-name="P23"><text:span text:style-name="T5">ID (Identificadores):</text:span><text:span text:style-name="T6"> <text:s/></text:span><text:span text:style-name="Source_20_Text"><text:span text:style-name="T6">BIGINT GENERATED BY DEFAULT AS IDENTITY</text:span></text:span><text:span text:style-name="T6">, garantindo o incremento seguro de chaves de 64 bits a partir de 1.000.000.001.</text:span></text:p>
        </text:list-item>
      </text:list>
      <text:list text:style-name="WWNum12">
        <text:list-item>
          <text:p text:style-name="P24" loext:marker-style-name="T1"><text:span text:style-name="T5">NM (Nomes), CD (Códigos) e NU (Números)</text:span><text:span text:style-name="T6">: <text:s/></text:span><text:span text:style-name="Source_20_Text"><text:span text:style-name="T6">VARCHAR(n)</text:span></text:span><text:span text:style-name="T6"> com tamanhos sensatos. </text:span></text:p>
        </text:list-item>
      </text:list>
      <text:list text:style-name="WWNum13">
        <text:list-item>
          <text:p text:style-name="P25" loext:marker-style-name="T1"><text:span text:style-name="T5">DS (Descrições longas):</text:span><text:span text:style-name="T6"> <text:s/></text:span><text:span text:style-name="Source_20_Text"><text:span text:style-name="T6">TEXT</text:span></text:span><text:span text:style-name="T6">. mais eficiente no Postgres de armazenar strings sem limite predefinido.</text:span></text:p>
        </text:list-item>
      </text:list>
      <text:list text:style-name="WWNum14">
        <text:list-item>
          <text:p text:style-name="P26" loext:marker-style-name="T1"><text:bookmark text:name="p-rc_1dc8cf086a0c4e0a-151"/><text:span text:style-name="T5">VL (Valores monetários):</text:span><text:span text:style-name="T6"> <text:s/></text:span><text:span text:style-name="Source_20_Text"><text:span text:style-name="T6">NUMERIC(10,2)</text:span></text:span><text:span text:style-name="T6">. <text:s/>Mapeia para o </text:span><text:span text:style-name="Source_20_Text"><text:span text:style-name="T6">java.math.BigDecimal</text:span></text:span><text:span text:style-name="T6">, garantindo precisão absoluta. </text:span></text:p>
        </text:list-item>
      </text:list>
      <text:list text:style-name="WWNum15">
        <text:list-item>
          <text:p text:style-name="P27" loext:marker-style-name="T1"><text:span text:style-name="T5">DT (Datas):</text:span><text:span text:style-name="T6"> <text:s/></text:span><text:span text:style-name="Source_20_Text"><text:span text:style-name="T6">TIMESTAMP</text:span></text:span><text:span text:style-name="T6">, armazena data e hora de forma compatível com o </text:span><text:span text:style-name="Source_20_Text"><text:span text:style-name="T6">java.time.LocalDateTime</text:span></text:span><text:span text:style-name="T6">.</text:span></text:p>
        </text:list-item>
      </text:list>
      <text:list text:style-name="WWNum16">
        <text:list-item>
          <text:p text:style-name="P28" loext:marker-style-name="T1"><text:bookmark text:name="p-rc_1dc8cf086a0c4e0a-152"/><text:span text:style-name="T5">ST (Situações) e CH (Flags):</text:span><text:span text:style-name="T6"> <text:s/></text:span><text:span text:style-name="Source_20_Text"><text:span text:style-name="T6">CHAR(1)</text:span></text:span><text:span text:style-name="T6">, atrelados a restrições </text:span><text:span text:style-name="Source_20_Text"><text:span text:style-name="T6">CHECK</text:span></text:span><text:span text:style-name="T6"> para o banco travar inserções de status inválidos (ex: permitir apenas 'S' ou 'N'). </text:span></text:p>
        </text:list-item>
      </text:list>
      <text:list text:style-name="WWNum17">
        <text:list-item>
          <text:p text:style-name="P29" loext:marker-style-name="T1"><text:span text:style-name="T5">QT (Quantidades):</text:span><text:span text:style-name="T6"> <text:s/></text:span><text:span text:style-name="Source_20_Text"><text:span text:style-name="T6">INTEGER</text:span></text:span><text:span text:style-name="T6"> (inteiro padrão de 32 bits, suficiente para capacidades e lotes).</text:span></text:p>
        </text:list-item>
      </text:list>
      <text:list text:style-name="WWNum18">
        <text:list-item>
          <text:p text:style-name="P30" loext:marker-style-name="T1"><text:span text:style-name="T5">BI (Binários):</text:span><text:span text:style-name="T6"> <text:s/></text:span><text:span text:style-name="Source_20_Text"><text:span text:style-name="T6">BYTEA</text:span></text:span><text:span text:style-name="T6"> para o armazenamento direto da imagem. </text:span></text:p>
        </text:list-item>
      </text:list>
      <text:p text:style-name="P31" loext:marker-style-name="T6"/>
      <text:p text:style-name="P1" loext:marker-style-name="T5"><text:span text:style-name="T5">Domínio de Valores (Status e Flags)</text:span><text:span text:style-name="T5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header-rows>
          <table:table-row table:style-name="Tabela1.1">
            <table:table-cell table:style-name="Tabela1.A1" office:value-type="string">
              <text:p text:style-name="P32"><text:span text:style-name="Strong_20_Emphasis"><text:span text:style-name="T7">Tabela</text:span></text:span></text:p>
            </table:table-cell>
            <table:table-cell table:style-name="Tabela1.A1" office:value-type="string">
              <text:p text:style-name="P32"><text:span text:style-name="Strong_20_Emphasis"><text:span text:style-name="T7">Coluna</text:span></text:span></text:p>
            </table:table-cell>
            <table:table-cell table:style-name="Tabela1.A1" office:value-type="string">
              <text:p text:style-name="P32"><text:span text:style-name="Strong_20_Emphasis"><text:span text:style-name="T7">Tipo</text:span></text:span></text:p>
            </table:table-cell>
            <table:table-cell table:style-name="Tabela1.A1" office:value-type="string">
              <text:p text:style-name="P32"><text:span text:style-name="Strong_20_Emphasis"><text:span text:style-name="T7">Valor no Banco</text:span></text:span></text:p>
            </table:table-cell>
            <table:table-cell table:style-name="Tabela1.A1" office:value-type="string">
              <text:p text:style-name="P32"><text:span text:style-name="Strong_20_Emphasis"><text:span text:style-name="T7">Significado</text:span></text:span></text:p>
            </table:table-cell>
            <table:table-cell table:style-name="Tabela1.A1" office:value-type="string">
              <text:p text:style-name="P32"><text:span text:style-name="Strong_20_Emphasis"><text:span text:style-name="T7">Comportamento no Sistema</text:span></text:span></text:p>
            </table:table-cell>
          </table:table-row>
        </table:table-header-rows>
        <table:table-row table:style-name="Tabela1.1">
          <table:table-cell table:style-name="Tabela1.A1" office:value-type="string">
            <text:p text:style-name="P33" loext:marker-style-name="T8"><text:span text:style-name="T8">TRA_transacao</text:span><text:span text:style-name="T8"/></text:p>
          </table:table-cell>
          <table:table-cell table:style-name="Tabela1.A1" office:value-type="string">
            <text:p text:style-name="P33"><text:span text:style-name="Source_20_Text"><text:span text:style-name="T7">tra_st_transacao</text:span></text:span></text:p>
          </table:table-cell>
          <table:table-cell table:style-name="Tabela1.A1" office:value-type="string">
            <text:p text:style-name="P33" loext:marker-style-name="T7"><text:span text:style-name="T7">Status</text:span><text:span text:style-name="T7"/></text:p>
          </table:table-cell>
          <table:table-cell table:style-name="Tabela1.A1" office:value-type="string">
            <text:p text:style-name="P33" loext:marker-style-name="T8"><text:span text:style-name="T8">'P'</text:span><text:span text:style-name="T8"/></text:p>
          </table:table-cell>
          <table:table-cell table:style-name="Tabela1.A1" office:value-type="string">
            <text:p text:style-name="P33" loext:marker-style-name="T7"><text:span text:style-name="T7">Pendente</text:span><text:span text:style-name="T7"/></text:p>
          </table:table-cell>
          <table:table-cell table:style-name="Tabela1.A1" office:value-type="string">
            <text:p text:style-name="P33" loext:marker-style-name="T7"><text:span text:style-name="T7">A compra foi iniciada, mas o sistema aguarda a confirmação do pagamento </text:span><text:soft-page-break/><text:span text:style-name="T7">(gateway). É o valor padrão (DEFAULT).</text:span><text:span text:style-name="T7"/></text:p>
          </table:table-cell>
        </table:table-row>
        <table:table-row table:style-name="Tabela1.1">
          <table:table-cell table:style-name="Tabela1.A1" office:value-type="string">
            <text:p text:style-name="P33" loext:marker-style-name="T8"><text:span text:style-name="T8">TRA_transacao</text:span><text:span text:style-name="T8"/></text:p>
          </table:table-cell>
          <table:table-cell table:style-name="Tabela1.A1" office:value-type="string">
            <text:p text:style-name="P33"><text:span text:style-name="Source_20_Text"><text:span text:style-name="T7">tra_st_transacao</text:span></text:span></text:p>
          </table:table-cell>
          <table:table-cell table:style-name="Tabela1.A1" office:value-type="string">
            <text:p text:style-name="P33" loext:marker-style-name="T7"><text:span text:style-name="T7">Status</text:span><text:span text:style-name="T7"/></text:p>
          </table:table-cell>
          <table:table-cell table:style-name="Tabela1.A1" office:value-type="string">
            <text:p text:style-name="P33" loext:marker-style-name="T8"><text:span text:style-name="T8">'C'</text:span><text:span text:style-name="T8"/></text:p>
          </table:table-cell>
          <table:table-cell table:style-name="Tabela1.A1" office:value-type="string">
            <text:p text:style-name="P33" loext:marker-style-name="T7"><text:span text:style-name="T7">Concluída</text:span><text:span text:style-name="T7"/></text:p>
          </table:table-cell>
          <table:table-cell table:style-name="Tabela1.A1" office:value-type="string">
            <text:p text:style-name="P33"><text:span text:style-name="T7">Pagamento aprovado. Transição de estado: </text:span><text:span text:style-name="Source_20_Text"><text:span text:style-name="T7">'P'</text:span></text:span><text:span text:style-name="T7"> → </text:span><text:span text:style-name="Source_20_Text"><text:span text:style-name="T7">'C'</text:span></text:span><text:span text:style-name="T7">.</text:span></text:p>
          </table:table-cell>
        </table:table-row>
        <table:table-row table:style-name="Tabela1.1">
          <table:table-cell table:style-name="Tabela1.A1" office:value-type="string">
            <text:p text:style-name="P33" loext:marker-style-name="T8"><text:span text:style-name="T8">TRA_transacao</text:span><text:span text:style-name="T8"/></text:p>
          </table:table-cell>
          <table:table-cell table:style-name="Tabela1.A1" office:value-type="string">
            <text:p text:style-name="P33"><text:span text:style-name="Source_20_Text"><text:span text:style-name="T7">tra_st_transacao</text:span></text:span></text:p>
          </table:table-cell>
          <table:table-cell table:style-name="Tabela1.A1" office:value-type="string">
            <text:p text:style-name="P33" loext:marker-style-name="T7"><text:span text:style-name="T7">Status</text:span><text:span text:style-name="T7"/></text:p>
          </table:table-cell>
          <table:table-cell table:style-name="Tabela1.A1" office:value-type="string">
            <text:p text:style-name="P33" loext:marker-style-name="T8"><text:span text:style-name="T8">'X'</text:span><text:span text:style-name="T8"/></text:p>
          </table:table-cell>
          <table:table-cell table:style-name="Tabela1.A1" office:value-type="string">
            <text:p text:style-name="P33" loext:marker-style-name="T7"><text:span text:style-name="T7">Cancelada</text:span><text:span text:style-name="T7"/></text:p>
          </table:table-cell>
          <table:table-cell table:style-name="Tabela1.A1" office:value-type="string">
            <text:p text:style-name="P33" loext:marker-style-name="T7"><text:span text:style-name="T7">Compra estornada ou recusada. Aciona a inativação em cascata dos ingressos.</text:span><text:span text:style-name="T7"/></text:p>
          </table:table-cell>
        </table:table-row>
        <table:table-row table:style-name="Tabela1.1">
          <table:table-cell table:style-name="Tabela1.A1" office:value-type="string">
            <text:p text:style-name="P33" loext:marker-style-name="T8"><text:span text:style-name="T8">ING_ingresso</text:span><text:span text:style-name="T8"/></text:p>
          </table:table-cell>
          <table:table-cell table:style-name="Tabela1.A1" office:value-type="string">
            <text:p text:style-name="P33"><text:span text:style-name="Source_20_Text"><text:span text:style-name="T7">ing_st_ingresso</text:span></text:span></text:p>
          </table:table-cell>
          <table:table-cell table:style-name="Tabela1.A1" office:value-type="string">
            <text:p text:style-name="P33" loext:marker-style-name="T7"><text:span text:style-name="T7">Status</text:span><text:span text:style-name="T7"/></text:p>
          </table:table-cell>
          <table:table-cell table:style-name="Tabela1.A1" office:value-type="string">
            <text:p text:style-name="P33" loext:marker-style-name="T8"><text:span text:style-name="T8">'A'</text:span><text:span text:style-name="T8"/></text:p>
          </table:table-cell>
          <table:table-cell table:style-name="Tabela1.A1" office:value-type="string">
            <text:p text:style-name="P33" loext:marker-style-name="T7"><text:span text:style-name="T7">Ativo</text:span><text:span text:style-name="T7"/></text:p>
          </table:table-cell>
          <table:table-cell table:style-name="Tabela1.A1" office:value-type="string">
            <text:p text:style-name="P33"><text:span text:style-name="T7">Ingresso emitido e válido para o evento. É o valor padrão (</text:span><text:span text:style-name="Source_20_Text"><text:span text:style-name="T7">DEFAULT</text:span></text:span><text:span text:style-name="T7">).</text:span></text:p>
          </table:table-cell>
        </table:table-row>
        <table:table-row table:style-name="Tabela1.1">
          <table:table-cell table:style-name="Tabela1.A1" office:value-type="string">
            <text:p text:style-name="P33" loext:marker-style-name="T8"><text:span text:style-name="T8">ING_ingresso</text:span><text:span text:style-name="T8"/></text:p>
          </table:table-cell>
          <table:table-cell table:style-name="Tabela1.A1" office:value-type="string">
            <text:p text:style-name="P33"><text:span text:style-name="Source_20_Text"><text:span text:style-name="T7">ing_st_ingresso</text:span></text:span></text:p>
          </table:table-cell>
          <table:table-cell table:style-name="Tabela1.A1" office:value-type="string">
            <text:p text:style-name="P33" loext:marker-style-name="T7"><text:span text:style-name="T7">Status</text:span><text:span text:style-name="T7"/></text:p>
          </table:table-cell>
          <table:table-cell table:style-name="Tabela1.A1" office:value-type="string">
            <text:p text:style-name="P33" loext:marker-style-name="T8"><text:span text:style-name="T8">'U'</text:span><text:span text:style-name="T8"/></text:p>
          </table:table-cell>
          <table:table-cell table:style-name="Tabela1.A1" office:value-type="string">
            <text:p text:style-name="P33" loext:marker-style-name="T7"><text:span text:style-name="T7">Utilizado</text:span><text:span text:style-name="T7"/></text:p>
          </table:table-cell>
          <table:table-cell table:style-name="Tabela1.A1" office:value-type="string">
            <text:p text:style-name="P33" loext:marker-style-name="T7"><text:span text:style-name="T7">O código foi validado na entrada do evento. O sistema bloqueia reentradas.</text:span><text:span text:style-name="T7"/></text:p>
          </table:table-cell>
        </table:table-row>
        <table:table-row table:style-name="Tabela1.1">
          <table:table-cell table:style-name="Tabela1.A1" office:value-type="string">
            <text:p text:style-name="P33" loext:marker-style-name="T8"><text:span text:style-name="T8">ING_ingresso</text:span><text:span text:style-name="T8"/></text:p>
          </table:table-cell>
          <table:table-cell table:style-name="Tabela1.A1" office:value-type="string">
            <text:p text:style-name="P33"><text:span text:style-name="Source_20_Text"><text:span text:style-name="T7">ing_st_ingresso</text:span></text:span></text:p>
          </table:table-cell>
          <table:table-cell table:style-name="Tabela1.A1" office:value-type="string">
            <text:p text:style-name="P33" loext:marker-style-name="T7"><text:span text:style-name="T7">Status</text:span><text:span text:style-name="T7"/></text:p>
          </table:table-cell>
          <table:table-cell table:style-name="Tabela1.A1" office:value-type="string">
            <text:p text:style-name="P33" loext:marker-style-name="T8"><text:span text:style-name="T8">'C'</text:span><text:span text:style-name="T8"/></text:p>
          </table:table-cell>
          <table:table-cell table:style-name="Tabela1.A1" office:value-type="string">
            <text:p text:style-name="P33" loext:marker-style-name="T7"><text:span text:style-name="T7">Cancelado</text:span><text:span text:style-name="T7"/></text:p>
          </table:table-cell>
          <table:table-cell table:style-name="Tabela1.A1" office:value-type="string">
            <text:p text:style-name="P33" loext:marker-style-name="T7"><text:span text:style-name="T7">Ingresso invalidado via Procedure de estorno. Não pode ser usado na catraca.</text:span><text:span text:style-name="T7"/></text:p>
          </table:table-cell>
        </table:table-row>
        <table:table-row table:style-name="Tabela1.1">
          <table:table-cell table:style-name="Tabela1.A1" office:value-type="string">
            <text:p text:style-name="P33" loext:marker-style-name="T8"><text:span text:style-name="T8">WEB_webhook</text:span><text:span text:style-name="T8"/></text:p>
          </table:table-cell>
          <table:table-cell table:style-name="Tabela1.A1" office:value-type="string">
            <text:p text:style-name="P33"><text:span text:style-name="Source_20_Text"><text:span text:style-name="T7">web_ch_ativo</text:span></text:span></text:p>
          </table:table-cell>
          <table:table-cell table:style-name="Tabela1.A1" office:value-type="string">
            <text:p text:style-name="P33" loext:marker-style-name="T7"><text:span text:style-name="T7">Flag</text:span><text:span text:style-name="T7"/></text:p>
          </table:table-cell>
          <table:table-cell table:style-name="Tabela1.A1" office:value-type="string">
            <text:p text:style-name="P33" loext:marker-style-name="T8"><text:span text:style-name="T8">'S'</text:span><text:span text:style-name="T8"/></text:p>
          </table:table-cell>
          <table:table-cell table:style-name="Tabela1.A1" office:value-type="string">
            <text:p text:style-name="P33" loext:marker-style-name="T7"><text:span text:style-name="T7">Sim</text:span><text:span text:style-name="T7"/></text:p>
          </table:table-cell>
          <table:table-cell table:style-name="Tabela1.A1" office:value-type="string">
            <text:p text:style-name="P33"><text:span text:style-name="T7">O back-end disparará notificações em tempo real <text:s/>para a URL cadastrada (</text:span><text:span text:style-name="Source_20_Text"><text:span text:style-name="T7">DEFAULT</text:span></text:span><text:span text:style-name="T7">).</text:span></text:p>
          </table:table-cell>
        </table:table-row>
        <table:table-row table:style-name="Tabela1.1">
          <table:table-cell table:style-name="Tabela1.A1" office:value-type="string">
            <text:p text:style-name="P33" loext:marker-style-name="T8"><text:span text:style-name="T8">WEB_webhook</text:span><text:span text:style-name="T8"/></text:p>
          </table:table-cell>
          <table:table-cell table:style-name="Tabela1.A1" office:value-type="string">
            <text:p text:style-name="P33"><text:span text:style-name="Source_20_Text"><text:span text:style-name="T7">web_ch_ativo</text:span></text:span></text:p>
          </table:table-cell>
          <table:table-cell table:style-name="Tabela1.A1" office:value-type="string">
            <text:p text:style-name="P33" loext:marker-style-name="T7"><text:span text:style-name="T7">Flag</text:span><text:span text:style-name="T7"/></text:p>
          </table:table-cell>
          <table:table-cell table:style-name="Tabela1.A1" office:value-type="string">
            <text:p text:style-name="P33" loext:marker-style-name="T8"><text:span text:style-name="T8">'N'</text:span><text:span text:style-name="T8"/></text:p>
          </table:table-cell>
          <table:table-cell table:style-name="Tabela1.A1" office:value-type="string">
            <text:p text:style-name="P33" loext:marker-style-name="T7"><text:span text:style-name="T7">Não</text:span><text:span text:style-name="T7"/></text:p>
          </table:table-cell>
          <table:table-cell table:style-name="Tabela1.A1" office:value-type="string">
            <text:p text:style-name="P33" loext:marker-style-name="T7"><text:span text:style-name="T7">O disparo está pausado. O sistema ignora a URL até que seja reativada.</text:span><text:span text:style-name="T7"/></text:p>
          </table:table-cell>
        </table:table-row>
      </table:table>
      <text:p text:style-name="P34" loext:marker-style-name="T2"/>
      <text:p text:style-name="P34" loext:marker-style-name="T2"/>
      <text:h text:style-name="P35" text:outline-level="3" loext:marker-style-name="T1"><text:soft-page-break/><text:span text:style-name="T1">Índices (Otimização e Performance)</text:span><text:span text:style-name="T1"/></text:h>
      <text:p text:style-name="P36" loext:marker-style-name="T3"><text:span text:style-name="T3">Os índices atuam como sumários para o SGBD, evitando que o PostgreSQL precise varrer tabelas inteiras (</text:span><text:span text:style-name="T9">Sequential Scan</text:span><text:span text:style-name="T3">) para encontrar um registro. Eles são vitais para manter a aplicação veloz à medida que o volume de vendas cresce.</text:span></text:p>
      <text:list text:style-name="WWNum19">
        <text:list-item>
          <text:p text:style-name="P37" loext:marker-style-name="T3"><text:span text:style-name="Source_20_Text"><text:span text:style-name="T10">IDX_usu_email</text:span></text:span><text:span text:style-name="T10"/></text:p>
          <text:list>
            <text:list-item>
              <text:p text:style-name="P38" loext:marker-style-name="T3"><text:span text:style-name="T10">Tipo:</text:span><text:span text:style-name="T3"> Índice B-Tree.</text:span></text:p>
            </text:list-item>
            <text:list-item>
              <text:p text:style-name="P38" loext:marker-style-name="T3"><text:span text:style-name="T10">Função no banco:</text:span><text:span text:style-name="T3"> Otimizar a busca de usuários durante o processo de login (autenticação). Como o e-mail é único, este índice garante que a validação da credencial seja instantânea.</text:span></text:p>
            </text:list-item>
          </text:list>
        </text:list-item>
        <text:list-item>
          <text:p text:style-name="P37" loext:marker-style-name="T3"><text:span text:style-name="Source_20_Text"><text:span text:style-name="T10">IDX_eve_dt_evento</text:span></text:span><text:span text:style-name="T10"/></text:p>
          <text:list>
            <text:list-item>
              <text:p text:style-name="P38" loext:marker-style-name="T3"><text:span text:style-name="T10">Tipo:</text:span><text:span text:style-name="T3"> Índice B-Tree.</text:span></text:p>
            </text:list-item>
            <text:list-item>
              <text:p text:style-name="P38" loext:marker-style-name="T3"><text:span text:style-name="T10">Função no banco:</text:span><text:span text:style-name="T3"> Acelera a filtragem e a ordenação de eventos por data na tela inicial do catálogo (Angular), além de otimizar a checagem temporal de procedimentos de cancelamento.</text:span></text:p>
            </text:list-item>
          </text:list>
        </text:list-item>
        <text:list-item>
          <text:p text:style-name="P37" loext:marker-style-name="T3"><text:span text:style-name="Source_20_Text"><text:span text:style-name="T10">IDX_tpi_evento</text:span></text:span><text:span text:style-name="T10"/></text:p>
          <text:list>
            <text:list-item>
              <text:p text:style-name="P38" loext:marker-style-name="T3"><text:span text:style-name="T10">Tipo:</text:span><text:span text:style-name="T3"> Índice B-Tree (Chave Estrangeira).</text:span></text:p>
            </text:list-item>
            <text:list-item>
              <text:p text:style-name="P38" loext:marker-style-name="T3"><text:span text:style-name="T10">Função no banco:</text:span><text:span text:style-name="T3"> Otimiza a junção (</text:span><text:span text:style-name="Source_20_Text"><text:span text:style-name="T3">JOIN</text:span></text:span><text:span text:style-name="T3">) entre as tabelas de Eventos e Tipos de Ingresso, acelerando a listagem de setores e preços de um evento específico.</text:span></text:p>
            </text:list-item>
          </text:list>
        </text:list-item>
        <text:list-item>
          <text:p text:style-name="P37" loext:marker-style-name="T3"><text:span text:style-name="Source_20_Text"><text:span text:style-name="T10">IDX_ing_tipo</text:span></text:span><text:span text:style-name="T10"> e </text:span><text:span text:style-name="Source_20_Text"><text:span text:style-name="T10">IDX_ing_transacao</text:span></text:span></text:p>
          <text:list>
            <text:list-item>
              <text:p text:style-name="P38" loext:marker-style-name="T3"><text:span text:style-name="T10">Tipo:</text:span><text:span text:style-name="T3"> Índices B-Tree (Chaves Estrangeiras).</text:span></text:p>
            </text:list-item>
            <text:list-item>
              <text:p text:style-name="P38" loext:marker-style-name="T3"><text:span text:style-name="T10">Função no banco:</text:span><text:span text:style-name="T3"> São os índices mais exigidos no sistema. Eles aceleram a contagem de ingressos vendidos por lote para o cálculo de lotação e otimizam a busca do histórico de compras de cada transação.</text:span></text:p>
            </text:list-item>
          </text:list>
        </text:list-item>
        <text:list-item>
          <text:p text:style-name="P37" loext:marker-style-name="T3"><text:span text:style-name="Source_20_Text"><text:span text:style-name="T10">IDX_ing_status</text:span></text:span><text:span text:style-name="T10"/></text:p>
          <text:list>
            <text:list-item>
              <text:p text:style-name="P38" loext:marker-style-name="T3"><text:span text:style-name="T10">Tipo:</text:span><text:span text:style-name="T3"> Índice B-Tree.</text:span></text:p>
            </text:list-item>
            <text:list-item>
              <text:p text:style-name="P39" loext:marker-style-name="T3"><text:span text:style-name="T10">Função no banco:</text:span><text:span text:style-name="T3"> Otimiza as consultas de contagem executadas pelo trigger </text:span><text:span text:style-name="Source_20_Text"><text:span text:style-name="T3">TR_validar_lotacao</text:span></text:span><text:span text:style-name="T3"> a cada nova venda. Como o trigger filtra por </text:span><text:span text:style-name="Source_20_Text"><text:span text:style-name="T3">ing_st_ingresso IN ('A', 'U')</text:span></text:span><text:span text:style-name="T3"> em alta concorrência (múltiplas vendas simultâneas), este índice é crítico para manter a performance do sistema em picos de demanda.</text:span></text:p>
            </text:list-item>
          </text:list>
        </text:list-item>
      </text:list>
      <text:h text:style-name="P35" text:outline-level="3" loext:marker-style-name="T1"><text:soft-page-break/><text:span text:style-name="T1">Visões (Views / Camada de Relatórios)</text:span><text:span text:style-name="T1"/></text:h>
      <text:list text:style-name="WWNum20">
        <text:list-item>
          <text:p text:style-name="P40" loext:marker-style-name="T3"><text:span text:style-name="Source_20_Text"><text:span text:style-name="T10">VW_resumo_vendas_evento</text:span></text:span><text:span text:style-name="T10"/></text:p>
          <text:list>
            <text:list-item>
              <text:p text:style-name="P41" loext:marker-style-name="T3"><text:span text:style-name="T10">Tipo:</text:span><text:span text:style-name="T3"> View Relacional.</text:span></text:p>
            </text:list-item>
            <text:list-item>
              <text:p text:style-name="P41" loext:marker-style-name="T3"><text:span text:style-name="T10">Função no banco:</text:span><text:span text:style-name="T3"> Centraliza e consolida os dados de vendas de todos os eventos em uma única estrutura de leitura rápida. Ela realiza os </text:span><text:span text:style-name="Source_20_Text"><text:span text:style-name="T3">JOINs</text:span></text:span><text:span text:style-name="T3"> complexos entre quatro tabelas (</text:span><text:span text:style-name="Source_20_Text"><text:span text:style-name="T3">EVE_evento</text:span></text:span><text:span text:style-name="T3">, </text:span><text:span text:style-name="Source_20_Text"><text:span text:style-name="T3">TPI_tipo_ingresso</text:span></text:span><text:span text:style-name="T3">, </text:span><text:span text:style-name="Source_20_Text"><text:span text:style-name="T3">ING_ingresso</text:span></text:span><text:span text:style-name="T3"> e </text:span><text:span text:style-name="Source_20_Text"><text:span text:style-name="T3">TRA_transacao</text:span></text:span><text:span text:style-name="T3">) e calcula em tempo real a receita total gerada e a capacidade restante de cada atração.</text:span></text:p>
            </text:list-item>
            <text:list-item>
              <text:p text:style-name="P41" loext:marker-style-name="T3"><text:span text:style-name="T10">Utilidade no Java:</text:span><text:span text:style-name="T3"> Evita que o back-end precise escrever queries gigantescas com agrupamentos (</text:span><text:span text:style-name="Source_20_Text"><text:span text:style-name="T3">GROUP BY</text:span></text:span><text:span text:style-name="T3">) e funções de agregação (</text:span><text:span text:style-name="Source_20_Text"><text:span text:style-name="T3">COUNT</text:span></text:span><text:span text:style-name="T3">, </text:span><text:span text:style-name="Source_20_Text"><text:span text:style-name="T3">SUM</text:span></text:span><text:span text:style-name="T3">). O Java faz apenas um </text:span><text:span text:style-name="Source_20_Text"><text:span text:style-name="T3">SELECT * FROM VW_resumo_vendas_evento WHERE eve_id_evento = ?</text:span></text:span><text:span text:style-name="T3">.</text:span></text:p>
            </text:list-item>
          </text:list>
        </text:list-item>
      </text:list>
      <text:h text:style-name="P42" text:outline-level="3" loext:marker-style-name="T1"><text:span text:style-name="T1">Funções e Gatilhos (Functions e Triggers / Integridade Operacional)</text:span><text:span text:style-name="T1"/></text:h>
      <text:list text:style-name="WWNum21">
        <text:list-item>
          <text:p text:style-name="P43" loext:marker-style-name="T3"><text:span text:style-name="Source_20_Text"><text:span text:style-name="T10">FN_calcular_capacidade_restante</text:span></text:span><text:span text:style-name="T10"/></text:p>
          <text:list>
            <text:list-item>
              <text:p text:style-name="P44" loext:marker-style-name="T3"><text:span text:style-name="T10">Tipo:</text:span><text:span text:style-name="T3"> Stored Function (PL/pgSQL).</text:span></text:p>
            </text:list-item>
            <text:list-item>
              <text:p text:style-name="P44" loext:marker-style-name="T3"><text:span text:style-name="T10">Função no banco:</text:span><text:span text:style-name="T3"> Recebe o identificador de um evento e realiza um cálculo matemático real: subtrai a quantidade de ingressos válidos emitidos (com status 'A' de Ativo ou 'U' de Utilizado) da capacidade máxima registrada para aquele recinto. Retorna um número inteiro com o saldo de assentos disponíveis.</text:span></text:p>
            </text:list-item>
          </text:list>
        </text:list-item>
        <text:list-item>
          <text:p text:style-name="P43" loext:marker-style-name="T3"><text:span text:style-name="Source_20_Text"><text:span text:style-name="T10">FN_TG_validar_venda</text:span></text:span><text:span text:style-name="T10"/></text:p>
          <text:list>
            <text:list-item>
              <text:p text:style-name="P44" loext:marker-style-name="T3"><text:span text:style-name="T10">Tipo:</text:span><text:span text:style-name="T3"> Trigger Function (PL/pgSQL).</text:span></text:p>
            </text:list-item>
            <text:list-item>
              <text:p text:style-name="P44" loext:marker-style-name="T3"><text:span text:style-name="T10">Função no banco:</text:span><text:span text:style-name="T3"> Atua como o cérebro da barreira anti-overbooking. Ela intercepta a tentativa de inserção de um novo ingresso e executa duas validações obrigatórias em sequência: (1) verifica se o evento ainda possui capacidade total disponível invocando </text:span><text:span text:style-name="Source_20_Text"><text:span text:style-name="T3">FN_calcular_capacidade_restante</text:span></text:span><text:span text:style-name="T3">; (2) verifica se o lote específico (</text:span><text:span text:style-name="Source_20_Text"><text:span text:style-name="T3">tpi_qt_lote</text:span></text:span><text:span text:style-name="T3">) não foi esgotado. Se qualquer uma das validações falhar, a função interrompe a execução imediatamente e dispara uma exceção descritiva para o sistema.</text:span></text:p>
            </text:list-item>
          </text:list>
        </text:list-item>
        <text:list-item>
          <text:p text:style-name="P43" loext:marker-style-name="T3"><text:span text:style-name="Source_20_Text"><text:span text:style-name="T10">TR_validar_lotacao</text:span></text:span><text:span text:style-name="T10"/></text:p>
          <text:list>
            <text:list-item>
              <text:p text:style-name="P44" loext:marker-style-name="T3"><text:span text:style-name="T10">Tipo:</text:span><text:span text:style-name="T3"> Trigger (Gatilho </text:span><text:span text:style-name="Source_20_Text"><text:span text:style-name="T3">BEFORE INSERT</text:span></text:span><text:span text:style-name="T3">).</text:span></text:p>
            </text:list-item>
            <text:list-item>
              <text:p text:style-name="P44" loext:marker-style-name="T3"><text:soft-page-break/><text:span text:style-name="T10">Função no banco:</text:span><text:span text:style-name="T3"> É o guardião amarrado diretamente à tabela </text:span><text:span text:style-name="Source_20_Text"><text:span text:style-name="T3">ING_ingresso</text:span></text:span><text:span text:style-name="T3">. Ela garante que a função </text:span><text:span text:style-name="Source_20_Text"><text:span text:style-name="T3">FN_TG_validar_venda</text:span></text:span><text:span text:style-name="T3"> seja disparada automaticamente </text:span><text:span text:style-name="T10">antes</text:span><text:span text:style-name="T3"> que qualquer linha de ingresso seja de fato gravada no disco, forçando um </text:span><text:span text:style-name="Source_20_Text"><text:span text:style-name="T3">ROLLBACK</text:span></text:span><text:span text:style-name="T3"> se o lote estiver esgotado.</text:span></text:p>
            </text:list-item>
          </text:list>
        </text:list-item>
      </text:list>
      <text:h text:style-name="P42" text:outline-level="3" loext:marker-style-name="T1"><text:span text:style-name="T1">Procedimentos Armazenados (Procedures / Camada Transacional)</text:span><text:span text:style-name="T1"/></text:h>
      <text:list text:style-name="WWNum22">
        <text:list-item>
          <text:p text:style-name="P45" loext:marker-style-name="T3"><text:span text:style-name="Source_20_Text"><text:span text:style-name="T10">PR_cancelar_transacao</text:span></text:span><text:span text:style-name="T10"/></text:p>
          <text:list>
            <text:list-item>
              <text:p text:style-name="P46" loext:marker-style-name="T3"><text:span text:style-name="T10">Tipo:</text:span><text:span text:style-name="T3"> Stored Procedure (PL/pgSQL).</text:span></text:p>
            </text:list-item>
            <text:list-item>
              <text:p text:style-name="P46" loext:marker-style-name="T3"><text:span text:style-name="T10">Função no banco:</text:span><text:span text:style-name="T3"> Encapsula toda a lógica crítica de um estorno financeiro sob o mesmo bloco transacional, garantindo que a operação seja "tudo ou nada" (Atomicidade do ACID). Ela executa cinco validações sequenciais e obrigatórias:</text:span></text:p>
              <text:list>
                <text:list-item>
                  <text:p text:style-name="P47" loext:marker-style-name="T3"><text:span text:style-name="T3">Bloqueia o registro da transação para evitar que outros processos mexam nele simultaneamente (</text:span><text:span text:style-name="Source_20_Text"><text:span text:style-name="T3">FOR UPDATE</text:span></text:span><text:span text:style-name="T3">).</text:span></text:p>
                </text:list-item>
                <text:list-item>
                  <text:p text:style-name="P47" loext:marker-style-name="T3"><text:span text:style-name="T3">Valida se o usuário que está solicitando o cancelamento é realmente o dono da compra.</text:span><text:span text:style-name="T3"/></text:p>
                </text:list-item>
                <text:list-item>
                  <text:p text:style-name="P47" loext:marker-style-name="T3"><text:span text:style-name="T3">Verifica a regra temporal: faz um </text:span><text:span text:style-name="Source_20_Text"><text:span text:style-name="T3">JOIN</text:span></text:span><text:span text:style-name="T3"> com a tabela de eventos e confere se a data/hora atual é anterior ao início do evento.</text:span></text:p>
                </text:list-item>
                <text:list-item>
                  <text:p text:style-name="P47" loext:marker-style-name="T3"><text:span text:style-name="T3">Bloqueia o cancelamento se qualquer ingresso da transação já estiver com status </text:span><text:span text:style-name="Source_20_Text"><text:span text:style-name="T3">'U'</text:span></text:span><text:span text:style-name="T3"> (Utilizado). É logicamente impossível cancelar uma entrada que já foi apresentada no evento.</text:span></text:p>
                </text:list-item>
                <text:list-item>
                  <text:p text:style-name="P47" loext:marker-style-name="T3"><text:span text:style-name="T3">Se todas as validações passarem, ela faz a alteração de status em cascata: muda a transação para 'X' (Cancelada) e todos os ingressos vinculados a ela para 'C' (Cancelados).</text:span><text:span text:style-name="T3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 style:font-family-generic="roman" style:font-pitch="variable"/>
    <style:font-face style:name="Google Sans Text" svg:font-family="'Google Sans Text', sans-serif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2" fo:widows="2" fo:hyphenation-ladder-count="no-limit" fo:hyphenation-keep="page" loext:hyphenation-keep-type="column" loext:hyphenation-keep-line="tru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2" style:display-name="ListLabel 1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4" style:display-name="ListLabel 1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5" style:display-name="ListLabel 1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8" style:display-name="ListLabel 1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1" style:display-name="ListLabel 1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4" style:display-name="ListLabel 1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6" style:display-name="ListLabel 1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7" style:display-name="ListLabel 1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0" style:display-name="ListLabel 1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fo:font-family="Symbol" style:font-charset="x-symbol"/>
      </text:list-level-style-bullet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fo:font-family="Symbol" style:font-charset="x-symbol"/>
      </text:list-level-style-bullet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fo:font-family="Symbol" style:font-charset="x-symbol"/>
      </text:list-level-style-bullet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fo:font-family="Symbol" style:font-charset="x-symbol"/>
      </text:list-level-style-bullet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fo:font-family="Symbol" style:font-charset="x-symbol"/>
      </text:list-level-style-bullet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fo:font-family="Symbol" style:font-charset="x-symbol"/>
      </text:list-level-style-bullet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fo:font-family="Symbol" style:font-charset="x-symbol"/>
      </text:list-level-style-bullet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1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1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1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6T17:37:29</meta:creation-date>
    <dc:language>en-US</dc:language>
    <dc:date>2026-05-16T18:30:45</dc:date>
    <meta:editing-cycles>3</meta:editing-cycles>
    <meta:editing-duration>PT25M</meta:editing-duration>
    <meta:generator>LibreOffice/26.2.2.2$Linux_X86_64 LibreOffice_project/620$Build-2</meta:generator>
    <meta:document-statistic meta:table-count="1" meta:image-count="0" meta:object-count="0" meta:page-count="9" meta:paragraph-count="175" meta:word-count="1907" meta:character-count="13093" meta:non-whitespace-character-count="11451"/>
    <meta:user-defined meta:name="AppVersion">15.0000</meta:user-defined>
  </office:meta>
</office:document-meta>
</file>